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rial" officeooo:paragraph-rsid="00009a60"/>
    </style:style>
    <style:style style:name="P2" style:family="paragraph" style:parent-style-name="Preformatted_20_Text">
      <style:text-properties style:font-name="Arial" fo:font-size="14pt" officeooo:paragraph-rsid="00009a60" style:font-size-asian="14pt" style:font-size-complex="14pt"/>
    </style:style>
    <style:style style:name="P3" style:family="paragraph" style:parent-style-name="Preformatted_20_Text">
      <style:text-properties style:font-name="Arial" fo:font-size="12pt" officeooo:rsid="0000dd13" officeooo:paragraph-rsid="0000dd13" style:font-size-asian="12pt" style:font-size-complex="12pt"/>
    </style:style>
    <style:style style:name="P4" style:family="paragraph" style:parent-style-name="Preformatted_20_Text">
      <style:text-properties style:font-name="Arial" fo:font-size="12pt" officeooo:rsid="00016e11" officeooo:paragraph-rsid="00016e11" style:font-size-asian="12pt" style:font-size-complex="12pt"/>
    </style:style>
    <style:style style:name="P5" style:family="paragraph" style:parent-style-name="Preformatted_20_Text">
      <style:text-properties style:font-name="Arial" fo:font-size="12pt" officeooo:rsid="0002c3c5" officeooo:paragraph-rsid="0002c3c5" style:font-size-asian="12pt" style:font-size-complex="12pt"/>
    </style:style>
    <style:style style:name="T1" style:family="text">
      <style:text-properties officeooo:rsid="0000dd13"/>
    </style:style>
    <style:style style:name="T2" style:family="text">
      <style:text-properties officeooo:rsid="00016e1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text:span>.</text:p>
      <text:p text:style-name="P1"/>
      <text:p text:style-name="P3">La bretxa digital va ser i encara és una de les diferències més radicals entre la societat del primer món i la del tercer món.</text:p>
      <text:p text:style-name="P3"/>
      <text:p text:style-name="P3">Nosaltres vivim molt tranquils al primer món, tant tranquils que ens podem permetre una vida amb tot tipus de luxes d’àmbit digital, cóm be poden ser telèfons mòbils, portàtils, ordinadors, tauletes, o el que sigui.</text:p>
      <text:p text:style-name="P3"/>
      <text:p text:style-name="P3">I clar, ara mateix, en països del tercer món es normal poder accedir a aquests luxos a l’any 2025 ja que hi ha mercats especialitzats en aquest sector que busquen expandir el seu negoci per també acaparar aquests països, que semblen que no importen tant a nivell econòmic individual, si no que l’atracció principal és la potencial quantitat de clients.</text:p>
      <text:p text:style-name="P3"/>
      <text:p text:style-name="P3">Però el problema real, no és la manca de dispositius digitals que la gent del tercer món no es pot permetre, almenys no tant fàcilment cóm aquí; si no la bretxa d’educació digital.</text:p>
      <text:p text:style-name="P3"/>
      <text:p text:style-name="P3">Aquí, es proporciona una decent educació digital durant la infància o la joventut dels alumnes de qualsevol escola pública, però hi ha molts països tercermundistes on això no passa.</text:p>
      <text:p text:style-name="P3"/>
      <text:p text:style-name="P3">Per exemple, un usuari que resideix a un poble perdut de Sudan del Sud al centre d’Àfrica, és més propens a ser estafat per Internet que un usuari que resideix a un país europeu, ja que aquest ha rebut una prèvia mínima educació digital per que aquestes coses no li passin, o cóm ara, la implementació de la IA i els mètodes que s’utilitzen per entrenar-la.</text:p>
      <text:p text:style-name="P3"/>
      <text:p text:style-name="P3">A la majoria de països del primer món, ha quedat prohibit que la IA pugui ser entrenada a partir de les dades dels usuaris sense demanar el seu previ consentiment, però l’<text:span text:style-name="T2">endarreriment</text:span> dels països tercermundistes <text:span text:style-name="T2">ha causat que les gegants corporacions que són propietaris de les IA que més ens sonen (ChatGPT, Gemini, Llama...) s’en aprofitin de les seves quasi inexistents polítiques de privacitat que tenen aquests països per abusar-ne, o cóm be pot ser, l’escàndal de World ID.</text:span></text:p>
      <text:p text:style-name="P3"/>
      <text:p text:style-name="P4">World ID va ser una iniciativa que proposava que la gent sigui escanejada per crear un identificador individual pensat de cara al futur per poder diferenciar a les «persones de veritat» de les IA, però va ser durament criticada pel seu involucrament amb la corporació Palantir, protagonista del concepte més radical de vigilància massiva que ha vist la humanitat fins a dia d’avui.</text:p>
      <text:p text:style-name="P4"/>
      <text:p text:style-name="P4">La gent del primer món va connectar dues neurones als seus cervells i es van donar compte ja fa un temps de que bàsicament estaven regalant les seves dades biomètriques a Palantir, però als països del tercer món això no va passar, i segueixen alimentant aquest monstre amb dades biomètriques i regalant la seva privacitat, ja no digital, si no personal a nivell real, amb la possible recompensa de guanyar un iPhone 12 de fa 5 anys que el més segur és que, efectivament, sigui una altra estafa.</text:p>
      <text:p text:style-name="P1"/>
      <text:p text:style-name="P1"/>
      <text:p text:style-name="P5">Per combatir aquesta incompetència digital, fa falta que aquests països inverteixin força en educació per així poder formar als alumnes en, no nomès ser exitosos i aixecar els seus països, si no també en educació digital per prevenir que succeeixin aquests success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5-10-21T20:47:12.102000000</dc:date>
    <meta:editing-duration>PT6M54S</meta:editing-duration>
    <meta:editing-cycles>2</meta:editing-cycles>
    <meta:generator>LibreOffice/6.0.4.2$Windows_X86_64 LibreOffice_project/9b0d9b32d5dcda91d2f1a96dc04c645c450872bf</meta:generator>
    <meta:document-statistic meta:table-count="0" meta:image-count="0" meta:object-count="0" meta:page-count="1" meta:paragraph-count="11" meta:word-count="521" meta:character-count="3035" meta:non-whitespace-character-count="2525"/>
  </office:meta>
</office:document-meta>
</file>