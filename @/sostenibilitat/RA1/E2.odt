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officeooo:paragraph-rsid="00009a60"/>
    </style:style>
    <style:style style:name="P2" style:family="paragraph" style:parent-style-name="Preformatted_20_Text">
      <style:text-properties style:font-name="Arial" fo:font-size="14pt" officeooo:paragraph-rsid="00009a60" style:font-size-asian="14pt" style:font-size-complex="14pt"/>
    </style:style>
    <style:style style:name="P3" style:family="paragraph" style:parent-style-name="Preformatted_20_Text">
      <style:text-properties style:font-name="Arial" fo:font-size="12pt" officeooo:paragraph-rsid="00009a60"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p text:style-name="P1"/>
      <text:p text:style-name="P3">Segons la «Fundació Aquae», a Espanya hi ha 1.019 espècies d’animals en perill d’extinció.</text:p>
      <text:p text:style-name="P3"/>
      <text:p text:style-name="P3">Les espècies en perill d’extinció més conegudes poden ser el Bisó Europeu, amb només 140 exemplars aproximadament, el Linx Ibèric amb 2.000 exemplars restants o l’Àguila Imperial amb 800 exemplars restants.</text:p>
      <text:p text:style-name="P3"/>
      <text:p text:style-name="P3">Algunes d’aquestes espècies solen migrar a altres païssos amb millors condicions de vida, ja sigui per que els hi rebatem els seus hàbitats naturals, la caça furtiva i el tràfic d’animals «exòtics» o per altres raons que amenacen la seva miserable existència.</text:p>
      <text:p text:style-name="P1"/>
      <text:p text:style-name="P1"/>
      <text:p text:style-name="P2">2.</text:p>
      <text:p text:style-name="P1"/>
      <text:p text:style-name="P3">Durant la pandèmia vam veure cóm els païsatges naturals del nostre país es van anar «curant» del que podia ser una sobreexplotació natural, i això va ser degut a que tothom ens vam veure forçats a tancar-nos a casa degut al virus COVID-19 i no hi va haver pràcticament contacte humà en llocs afectats per la nostra petjada devastadora, i doncs, aquests llocs es van recuperar.</text:p>
      <text:p text:style-name="P3"/>
      <text:p text:style-name="P3">Cóm a exemple puc ficar un camp que hi ha al meu poble, que no estava devastat, però si afectat per les activitats humanes en l’àrea. Un cop es va aixecar el confinament, aquests llocs van ser presenciats cóm si fossin «deixats», amb herbes de l’altura d’un nen de 5 anys, però realment no era que fossin «deixats», si no que els hem deixat lliures, hem deixat que aquests llocs es curin de la nostra empremta i per això estaven així.</text:p>
      <text:p text:style-name="P1"/>
      <text:p text:style-name="P1"/>
      <text:p text:style-name="P2">3.</text:p>
      <text:p text:style-name="P1"/>
      <text:p text:style-name="P3">Puc garantitzar que el meu mode de vida no influeix en l’anticipació del límit de la biocapacitat planetària, o almenys no de la meva part, però si de mà dels manufacturers dels productes que consumeix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0-16T18:47:35.261000000</dc:date>
    <meta:editing-duration>PT3M41S</meta:editing-duration>
    <meta:editing-cycles>1</meta:editing-cycles>
    <meta:document-statistic meta:table-count="0" meta:image-count="0" meta:object-count="0" meta:page-count="1" meta:paragraph-count="9" meta:word-count="272" meta:character-count="1575" meta:non-whitespace-character-count="1311"/>
    <meta:generator>LibreOffice/6.0.4.2$Windows_X86_64 LibreOffice_project/9b0d9b32d5dcda91d2f1a96dc04c645c450872bf</meta:generator>
  </office:meta>
</office:document-meta>
</file>